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6381" table:default-cell-style-name="Default"/>
        <table:table-row table:style-name="ro1">
          <table:table-cell office:value-type="string" calcext:value-type="string">
            <text:p>#Rapports18, minsup=25, nb_itemset_min=3, 04-03-2025</text:p>
          </table:table-cell>
          <table:table-cell table:number-columns-repeated="2"/>
          <table:table-cell office:value-type="string" calcext:value-type="string">
            <text:p>#Rappel: ADP=préposition</text:p>
          </table:table-cell>
          <table:table-cell table:number-columns-repeated="2"/>
          <table:table-cell office:value-type="string" calcext:value-type="string">
            <text:p>#Remarque générale : énormément de syntagme prépositionnels dans les motifs 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#Sélection de motifs</text:p>
          </table:table-cell>
          <table:table-cell table:number-columns-repeated="2"/>
          <table:table-cell office:value-type="string" calcext:value-type="string">
            <text:p>#type_custom est à remplacer par un exemple issu de Grew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ype_custom</text:p>
          </table:table-cell>
          <table:table-cell table:style-name="ce1" office:value-type="string" calcext:value-type="string">
            <text:p>motifs_int</text:p>
          </table:table-cell>
          <table:table-cell table:style-name="ce1" office:value-type="string" calcext:value-type="string">
            <text:p>motifs_str</text:p>
          </table:table-cell>
          <table:table-cell table:style-name="ce1" office:value-type="string" calcext:value-type="string">
            <text:p>ARSCAN</text:p>
          </table:table-cell>
          <table:table-cell table:style-name="ce1" office:value-type="string" calcext:value-type="string">
            <text:p>CHISCO</text:p>
          </table:table-cell>
          <table:table-cell table:style-name="ce1" office:value-type="string" calcext:value-type="string">
            <text:p>DICEN</text:p>
          </table:table-cell>
          <table:table-cell table:style-name="ce1" office:value-type="string" calcext:value-type="string">
            <text:p>LADYSS</text:p>
          </table:table-cell>
          <table:table-cell table:style-name="ce1" office:value-type="string" calcext:value-type="string">
            <text:p>LTIE</text:p>
          </table:table-cell>
          <table:table-cell table:style-name="ce1" office:value-type="string" calcext:value-type="string">
            <text:p>CDPC</text:p>
          </table:table-cell>
          <table:table-cell table:style-name="ce1" office:value-type="string" calcext:value-type="string">
            <text:p>CRDP</text:p>
          </table:table-cell>
          <table:table-cell table:style-name="ce1" office:value-type="string" calcext:value-type="string">
            <text:p>ECONOMIX</text:p>
          </table:table-cell>
          <table:table-cell table:style-name="ce1" office:value-type="string" calcext:value-type="string">
            <text:p>LAPPS</text:p>
          </table:table-cell>
          <table:table-cell table:style-name="ce1" office:value-type="string" calcext:value-type="string">
            <text:p>MODALX</text:p>
          </table:table-cell>
          <table:table-cell table:style-name="ce1" office:value-type="string" calcext:value-type="string">
            <text:p>CEDCAC</text:p>
          </table:table-cell>
          <table:table-cell table:style-name="ce1" office:value-type="string" calcext:value-type="string">
            <text:p>CREA</text:p>
          </table:table-cell>
          <table:table-cell table:style-name="ce1" office:value-type="string" calcext:value-type="string">
            <text:p>ERO</text:p>
          </table:table-cell>
          <table:table-cell table:style-name="ce1" office:value-type="string" calcext:value-type="string">
            <text:p>LEGS</text:p>
          </table:table-cell>
          <table:table-cell table:style-name="ce1" office:value-type="string" calcext:value-type="string">
            <text:p>MODYCO</text:p>
          </table:table-cell>
          <table:table-cell table:style-name="ce1" office:value-type="string" calcext:value-type="string">
            <text:p>CEDIN</text:p>
          </table:table-cell>
          <table:table-cell table:style-name="ce1" office:value-type="string" calcext:value-type="string">
            <text:p>CREF</text:p>
          </table:table-cell>
          <table:table-cell table:style-name="ce1" office:value-type="string" calcext:value-type="string">
            <text:p>HAR</text:p>
          </table:table-cell>
          <table:table-cell table:style-name="ce1" office:value-type="string" calcext:value-type="string">
            <text:p>LEME</text:p>
          </table:table-cell>
          <table:table-cell table:style-name="ce1" office:value-type="string" calcext:value-type="string">
            <text:p>MONDESA</text:p>
          </table:table-cell>
          <table:table-cell table:style-name="ce1" office:value-type="string" calcext:value-type="string">
            <text:p>CEJEC</text:p>
          </table:table-cell>
          <table:table-cell table:style-name="ce1" office:value-type="string" calcext:value-type="string">
            <text:p>CRESPPA</text:p>
          </table:table-cell>
          <table:table-cell table:style-name="ce1" office:value-type="string" calcext:value-type="string">
            <text:p>IDHES</text:p>
          </table:table-cell>
          <table:table-cell table:style-name="ce1" office:value-type="string" calcext:value-type="string">
            <text:p>LESC</text:p>
          </table:table-cell>
          <table:table-cell table:style-name="ce1" office:value-type="string" calcext:value-type="string">
            <text:p>PRETECH</text:p>
          </table:table-cell>
          <table:table-cell table:style-name="ce1" office:value-type="string" calcext:value-type="string">
            <text:p>CEREG</text:p>
          </table:table-cell>
          <table:table-cell table:style-name="ce1" office:value-type="string" calcext:value-type="string">
            <text:p>CRPM</text:p>
          </table:table-cell>
          <table:table-cell table:style-name="ce1" office:value-type="string" calcext:value-type="string">
            <text:p>IREPH</text:p>
          </table:table-cell>
          <table:table-cell table:style-name="ce1" office:value-type="string" calcext:value-type="string">
            <text:p>LICAE</text:p>
          </table:table-cell>
          <table:table-cell table:style-name="ce1" office:value-type="string" calcext:value-type="string">
            <text:p>SOPHIAPOL</text:p>
          </table:table-cell>
          <table:table-cell table:style-name="ce1" office:value-type="string" calcext:value-type="string">
            <text:p>CEROS</text:p>
          </table:table-cell>
          <table:table-cell table:style-name="ce1" office:value-type="string" calcext:value-type="string">
            <text:p>CSLF</text:p>
          </table:table-cell>
          <table:table-cell table:style-name="ce1" office:value-type="string" calcext:value-type="string">
            <text:p>IRERP</text:p>
          </table:table-cell>
          <table:table-cell table:style-name="ce1" office:value-type="string" calcext:value-type="string">
            <text:p>LINP2</text:p>
          </table:table-cell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CTAD</text:p>
          </table:table-cell>
          <table:table-cell table:style-name="ce1" office:value-type="string" calcext:value-type="string">
            <text:p>ISP</text:p>
          </table:table-cell>
          <table:table-cell table:style-name="ce1" office:value-type="string" calcext:value-type="string">
            <text:p>LIPO</text:p>
          </table:table-cell>
          <table:table-cell table:style-name="ce1" table:number-columns-repeated="16343"/>
        </table:table-row>
        <table:table-row table:style-name="ro1">
          <table:table-cell table:style-name="ce2" office:value-type="string" calcext:value-type="string">
            <text:p>le truc de</text:p>
          </table:table-cell>
          <table:table-cell office:value-type="string" calcext:value-type="string">
            <text:p>[{24}, {3}, {17, 18}]</text:p>
          </table:table-cell>
          <table:table-cell office:value-type="string" calcext:value-type="string">
            <text:p>{pos_DET} {pos_NOUN} {lemma_de,pos_ADP}</text:p>
          </table:table-cell>
          <table:table-cell office:value-type="float" office:value="-12.2483296289223" calcext:value-type="float">
            <text:p>-12.2483296289223</text:p>
          </table:table-cell>
          <table:table-cell office:value-type="string" calcext:value-type="string">
            <text:p>inf</text:p>
          </table:table-cell>
          <table:table-cell office:value-type="float" office:value="10.7123689635792" calcext:value-type="float">
            <text:p>10.7123689635792</text:p>
          </table:table-cell>
          <table:table-cell office:value-type="float" office:value="7.29918798105114" calcext:value-type="float">
            <text:p>7.29918798105114</text:p>
          </table:table-cell>
          <table:table-cell office:value-type="float" office:value="-170.265281070674" calcext:value-type="float">
            <text:p>-170.265281070674</text:p>
          </table:table-cell>
          <table:table-cell office:value-type="float" office:value="3.49895949360766" calcext:value-type="float">
            <text:p>3.49895949360766</text:p>
          </table:table-cell>
          <table:table-cell office:value-type="float" office:value="0.858081250439284" calcext:value-type="float">
            <text:p>0.858081250439284</text:p>
          </table:table-cell>
          <table:table-cell office:value-type="float" office:value="0.505664672863117" calcext:value-type="float">
            <text:p>0.505664672863117</text:p>
          </table:table-cell>
          <table:table-cell office:value-type="string" calcext:value-type="string">
            <text:p>-inf</text:p>
          </table:table-cell>
          <table:table-cell office:value-type="float" office:value="10.4900525334626" calcext:value-type="float">
            <text:p>10.4900525334626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6.62561088355747" calcext:value-type="float">
            <text:p>6.62561088355747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3.40534915215177" calcext:value-type="float">
            <text:p>3.40534915215177</text:p>
          </table:table-cell>
          <table:table-cell office:value-type="float" office:value="12.4557280811981" calcext:value-type="float">
            <text:p>12.4557280811981</text:p>
          </table:table-cell>
          <table:table-cell office:value-type="float" office:value="-0.746503704598823" calcext:value-type="float">
            <text:p>-0.746503704598823</text:p>
          </table:table-cell>
          <table:table-cell office:value-type="float" office:value="10.5392007007705" calcext:value-type="float">
            <text:p>10.5392007007705</text:p>
          </table:table-cell>
          <table:table-cell office:value-type="float" office:value="-3.06704294644706" calcext:value-type="float">
            <text:p>-3.06704294644706</text:p>
          </table:table-cell>
          <table:table-cell office:value-type="string" calcext:value-type="string">
            <text:p>-inf</text:p>
          </table:table-cell>
          <table:table-cell office:value-type="float" office:value="10.6642634999792" calcext:value-type="float">
            <text:p>10.6642634999792</text:p>
          </table:table-cell>
          <table:table-cell office:value-type="string" calcext:value-type="string">
            <text:p>inf</text:p>
          </table:table-cell>
          <table:table-cell office:value-type="float" office:value="11.138945621059" calcext:value-type="float">
            <text:p>11.138945621059</text:p>
          </table:table-cell>
          <table:table-cell office:value-type="float" office:value="0.552642020794543" calcext:value-type="float">
            <text:p>0.552642020794543</text:p>
          </table:table-cell>
          <table:table-cell office:value-type="string" calcext:value-type="string">
            <text:p>inf</text:p>
          </table:table-cell>
          <table:table-cell office:value-type="float" office:value="-234.391069836151" calcext:value-type="float">
            <text:p>-234.39106983615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#</text:p>
          </table:table-cell>
          <table:table-cell office:value-type="float" office:value="6.5733452074075" calcext:value-type="float">
            <text:p>6.5733452074075</text:p>
          </table:table-cell>
          <table:table-cell office:value-type="float" office:value="11.1024514908834" calcext:value-type="float">
            <text:p>11.1024514908834</text:p>
          </table:table-cell>
          <table:table-cell office:value-type="float" office:value="10.5363945790323" calcext:value-type="float">
            <text:p>10.5363945790323</text:p>
          </table:table-cell>
          <table:table-cell office:value-type="float" office:value="0.907181374391983" calcext:value-type="float">
            <text:p>0.907181374391983</text:p>
          </table:table-cell>
          <table:table-cell office:value-type="float" office:value="11.8805783241821" calcext:value-type="float">
            <text:p>11.8805783241821</text:p>
          </table:table-cell>
          <table:table-cell office:value-type="string" calcext:value-type="string">
            <text:p>inf</text:p>
          </table:table-cell>
          <table:table-cell office:value-type="float" office:value="9.43491728430199" calcext:value-type="float">
            <text:p>9.43491728430199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>
            <text:p>truc de truc</text:p>
          </table:table-cell>
          <table:table-cell office:value-type="string" calcext:value-type="string">
            <text:p>[{3}, {728, 17, 18, 730}, {5}]</text:p>
          </table:table-cell>
          <table:table-cell office:value-type="string" calcext:value-type="string">
            <text:p>{pos_NOUN} {lemma_de,pos_ADP,feats_de,wp_▁de} {feats_Number=Sing}</text:p>
          </table:table-cell>
          <table:table-cell office:value-type="float" office:value="-3.75127771383943" calcext:value-type="float">
            <text:p>-3.75127771383943</text:p>
          </table:table-cell>
          <table:table-cell office:value-type="float" office:value="9.54295289478533" calcext:value-type="float">
            <text:p>9.54295289478533</text:p>
          </table:table-cell>
          <table:table-cell office:value-type="float" office:value="10.6717592822068" calcext:value-type="float">
            <text:p>10.6717592822068</text:p>
          </table:table-cell>
          <table:table-cell office:value-type="float" office:value="7.8158624291443" calcext:value-type="float">
            <text:p>7.8158624291443</text:p>
          </table:table-cell>
          <table:table-cell office:value-type="float" office:value="-158.786526159005" calcext:value-type="float">
            <text:p>-158.786526159005</text:p>
          </table:table-cell>
          <table:table-cell office:value-type="float" office:value="10.3068987949937" calcext:value-type="float">
            <text:p>10.3068987949937</text:p>
          </table:table-cell>
          <table:table-cell office:value-type="float" office:value="0.437062725267114" calcext:value-type="float">
            <text:p>0.437062725267114</text:p>
          </table:table-cell>
          <table:table-cell office:value-type="float" office:value="1.25533459822038" calcext:value-type="float">
            <text:p>1.25533459822038</text:p>
          </table:table-cell>
          <table:table-cell office:value-type="string" calcext:value-type="string">
            <text:p>-inf</text:p>
          </table:table-cell>
          <table:table-cell office:value-type="float" office:value="9.3328718932411" calcext:value-type="float">
            <text:p>9.3328718932411</text:p>
          </table:table-cell>
          <table:table-cell table:number-columns-repeated="7" office:value-type="string" calcext:value-type="string">
            <text:p>inf</text:p>
          </table:table-cell>
          <table:table-cell office:value-type="float" office:value="1.91144126492977" calcext:value-type="float">
            <text:p>1.91144126492977</text:p>
          </table:table-cell>
          <table:table-cell office:value-type="float" office:value="8.10255366075147" calcext:value-type="float">
            <text:p>8.10255366075147</text:p>
          </table:table-cell>
          <table:table-cell office:value-type="float" office:value="-0.436340194451882" calcext:value-type="float">
            <text:p>-0.436340194451882</text:p>
          </table:table-cell>
          <table:table-cell office:value-type="float" office:value="10.6860468989573" calcext:value-type="float">
            <text:p>10.6860468989573</text:p>
          </table:table-cell>
          <table:table-cell office:value-type="float" office:value="0.352694620571239" calcext:value-type="float">
            <text:p>0.352694620571239</text:p>
          </table:table-cell>
          <table:table-cell office:value-type="string" calcext:value-type="string">
            <text:p>-inf</text:p>
          </table:table-cell>
          <table:table-cell office:value-type="float" office:value="10.6223109175728" calcext:value-type="float">
            <text:p>10.6223109175728</text:p>
          </table:table-cell>
          <table:table-cell office:value-type="string" calcext:value-type="string">
            <text:p>inf</text:p>
          </table:table-cell>
          <table:table-cell office:value-type="float" office:value="11.285021871154" calcext:value-type="float">
            <text:p>11.285021871154</text:p>
          </table:table-cell>
          <table:table-cell office:value-type="float" office:value="0.920274530351994" calcext:value-type="float">
            <text:p>0.920274530351994</text:p>
          </table:table-cell>
          <table:table-cell office:value-type="string" calcext:value-type="string">
            <text:p>inf</text:p>
          </table:table-cell>
          <table:table-cell office:value-type="float" office:value="-218.574715464324" calcext:value-type="float">
            <text:p>-218.57471546432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.6014614474656" calcext:value-type="float">
            <text:p>4.6014614474656</text:p>
          </table:table-cell>
          <table:table-cell office:value-type="float" office:value="10.9316914769712" calcext:value-type="float">
            <text:p>10.9316914769712</text:p>
          </table:table-cell>
          <table:table-cell office:value-type="float" office:value="10.6054502284365" calcext:value-type="float">
            <text:p>10.6054502284365</text:p>
          </table:table-cell>
          <table:table-cell office:value-type="float" office:value="0.400068532152976" calcext:value-type="float">
            <text:p>0.400068532152976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.14041163173242" calcext:value-type="float">
            <text:p>1.14041163173242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>
            <text:p>pour le truc</text:p>
          </table:table-cell>
          <table:table-cell office:value-type="string" calcext:value-type="string">
            <text:p>[{18}, {24, 5}, {3, 4, 5}]</text:p>
          </table:table-cell>
          <table:table-cell office:value-type="string" calcext:value-type="string">
            <text:p>{pos_ADP} {feats_Number=Sing,pos_DET} {pos_NOUN,feats_Gender=Masc,feats_Number=Sing}</text:p>
          </table:table-cell>
          <table:table-cell office:value-type="float" office:value="-5.08798980455025" calcext:value-type="float">
            <text:p>-5.08798980455025</text:p>
          </table:table-cell>
          <table:table-cell office:value-type="string" calcext:value-type="string">
            <text:p>inf</text:p>
          </table:table-cell>
          <table:table-cell office:value-type="float" office:value="10.8925872316551" calcext:value-type="float">
            <text:p>10.8925872316551</text:p>
          </table:table-cell>
          <table:table-cell office:value-type="float" office:value="3.19340020658885" calcext:value-type="float">
            <text:p>3.19340020658885</text:p>
          </table:table-cell>
          <table:table-cell office:value-type="float" office:value="-162.436792013847" calcext:value-type="float">
            <text:p>-162.436792013847</text:p>
          </table:table-cell>
          <table:table-cell office:value-type="float" office:value="5.63771442487605" calcext:value-type="float">
            <text:p>5.63771442487605</text:p>
          </table:table-cell>
          <table:table-cell office:value-type="float" office:value="3.58318517783926" calcext:value-type="float">
            <text:p>3.58318517783926</text:p>
          </table:table-cell>
          <table:table-cell office:value-type="float" office:value="-0.492153074728855" calcext:value-type="float">
            <text:p>-0.492153074728855</text:p>
          </table:table-cell>
          <table:table-cell office:value-type="string" calcext:value-type="string">
            <text:p>-inf</text:p>
          </table:table-cell>
          <table:table-cell office:value-type="float" office:value="11.088663015634" calcext:value-type="float">
            <text:p>11.088663015634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2.37596758515728" calcext:value-type="float">
            <text:p>2.3759675851572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6.17049215813708" calcext:value-type="float">
            <text:p>6.17049215813708</text:p>
          </table:table-cell>
          <table:table-cell office:value-type="float" office:value="-1.26493816855374" calcext:value-type="float">
            <text:p>-1.26493816855374</text:p>
          </table:table-cell>
          <table:table-cell office:value-type="float" office:value="9.33354660241003" calcext:value-type="float">
            <text:p>9.33354660241003</text:p>
          </table:table-cell>
          <table:table-cell office:value-type="float" office:value="-0.463927036468574" calcext:value-type="float">
            <text:p>-0.463927036468574</text:p>
          </table:table-cell>
          <table:table-cell office:value-type="string" calcext:value-type="string">
            <text:p>-inf</text:p>
          </table:table-cell>
          <table:table-cell office:value-type="float" office:value="10.8029564196184" calcext:value-type="float">
            <text:p>10.802956419618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-36.4067085911681" calcext:value-type="float">
            <text:p>-36.4067085911681</text:p>
          </table:table-cell>
          <table:table-cell office:value-type="string" calcext:value-type="string">
            <text:p>inf</text:p>
          </table:table-cell>
          <table:table-cell office:value-type="float" office:value="-223.604091488295" calcext:value-type="float">
            <text:p>-223.604091488295</text:p>
          </table:table-cell>
          <table:table-cell office:value-type="string" calcext:value-type="string">
            <text:p>inf</text:p>
          </table:table-cell>
          <table:table-cell office:value-type="float" office:value="3.78004599649348" calcext:value-type="float">
            <text:p>3.78004599649348</text:p>
          </table:table-cell>
          <table:table-cell office:value-type="float" office:value="6.80523986095944" calcext:value-type="float">
            <text:p>6.80523986095944</text:p>
          </table:table-cell>
          <table:table-cell office:value-type="string" calcext:value-type="string">
            <text:p>inf</text:p>
          </table:table-cell>
          <table:table-cell office:value-type="float" office:value="11.0150755094917" calcext:value-type="float">
            <text:p>11.0150755094917</text:p>
          </table:table-cell>
          <table:table-cell office:value-type="float" office:value="3.69793010055458" calcext:value-type="float">
            <text:p>3.69793010055458</text:p>
          </table:table-cell>
          <table:table-cell table:number-columns-repeated="3" office:value-type="string" calcext:value-type="string">
            <text:p>inf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>
            <text:p>truc pour le truc</text:p>
          </table:table-cell>
          <table:table-cell office:value-type="string" calcext:value-type="string">
            <text:p>[{3, 5}, {18}, {24, 25, 27, 23}, {3}]</text:p>
          </table:table-cell>
          <table:table-cell office:value-type="string" calcext:value-type="string">
            <text:p>{pos_NOUN,feats_Number=Sing} {pos_ADP} {lemma_le,pos_DET,feats_Definite=Def,feats_PronType=Art} {pos_NOUN}</text:p>
          </table:table-cell>
          <table:table-cell office:value-type="float" office:value="-115.708136053036" calcext:value-type="float">
            <text:p>-115.708136053036</text:p>
          </table:table-cell>
          <table:table-cell office:value-type="string" calcext:value-type="string">
            <text:p>inf</text:p>
          </table:table-cell>
          <table:table-cell office:value-type="float" office:value="-28.9079893429058" calcext:value-type="float">
            <text:p>-28.9079893429058</text:p>
          </table:table-cell>
          <table:table-cell office:value-type="float" office:value="-11.7472764816502" calcext:value-type="float">
            <text:p>-11.7472764816502</text:p>
          </table:table-cell>
          <table:table-cell office:value-type="float" office:value="-34.1826559182847" calcext:value-type="float">
            <text:p>-34.1826559182847</text:p>
          </table:table-cell>
          <table:table-cell office:value-type="float" office:value="-10.8799037500694" calcext:value-type="float">
            <text:p>-10.8799037500694</text:p>
          </table:table-cell>
          <table:table-cell office:value-type="float" office:value="-27.7708252788568" calcext:value-type="float">
            <text:p>-27.7708252788568</text:p>
          </table:table-cell>
          <table:table-cell office:value-type="float" office:value="-258.562636086052" calcext:value-type="float">
            <text:p>-258.562636086052</text:p>
          </table:table-cell>
          <table:table-cell office:value-type="float" office:value="-117.809981282602" calcext:value-type="float">
            <text:p>-117.809981282602</text:p>
          </table:table-cell>
          <table:table-cell office:value-type="float" office:value="10.3176357339394" calcext:value-type="float">
            <text:p>10.3176357339394</text:p>
          </table:table-cell>
          <table:table-cell office:value-type="string" calcext:value-type="string">
            <text:p>inf</text:p>
          </table:table-cell>
          <table:table-cell office:value-type="float" office:value="11.0447770909974" calcext:value-type="float">
            <text:p>11.0447770909974</text:p>
          </table:table-cell>
          <table:table-cell office:value-type="string" calcext:value-type="string">
            <text:p>inf</text:p>
          </table:table-cell>
          <table:table-cell office:value-type="float" office:value="-39.5086061565078" calcext:value-type="float">
            <text:p>-39.5086061565078</text:p>
          </table:table-cell>
          <table:table-cell office:value-type="float" office:value="-44.0324731943088" calcext:value-type="float">
            <text:p>-44.032473194308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-34.6719873721876" calcext:value-type="float">
            <text:p>-34.6719873721876</text:p>
          </table:table-cell>
          <table:table-cell office:value-type="float" office:value="-20.2223825351581" calcext:value-type="float">
            <text:p>-20.2223825351581</text:p>
          </table:table-cell>
          <table:table-cell office:value-type="float" office:value="-88.44507201263" calcext:value-type="float">
            <text:p>-88.44507201263</text:p>
          </table:table-cell>
          <table:table-cell office:value-type="float" office:value="10.395473490199" calcext:value-type="float">
            <text:p>10.395473490199</text:p>
          </table:table-cell>
          <table:table-cell office:value-type="float" office:value="-103.841425359907" calcext:value-type="float">
            <text:p>-103.841425359907</text:p>
          </table:table-cell>
          <table:table-cell office:value-type="float" office:value="-126.420223451909" calcext:value-type="float">
            <text:p>-126.420223451909</text:p>
          </table:table-cell>
          <table:table-cell office:value-type="float" office:value="10.2801907147798" calcext:value-type="float">
            <text:p>10.2801907147798</text:p>
          </table:table-cell>
          <table:table-cell office:value-type="string" calcext:value-type="string">
            <text:p>inf</text:p>
          </table:table-cell>
          <table:table-cell office:value-type="float" office:value="11.0373942064537" calcext:value-type="float">
            <text:p>11.0373942064537</text:p>
          </table:table-cell>
          <table:table-cell office:value-type="float" office:value="-7.67175942060299" calcext:value-type="float">
            <text:p>-7.67175942060299</text:p>
          </table:table-cell>
          <table:table-cell office:value-type="string" calcext:value-type="string">
            <text:p>inf</text:p>
          </table:table-cell>
          <table:table-cell office:value-type="float" office:value="-47.0230603042953" calcext:value-type="float">
            <text:p>-47.0230603042953</text:p>
          </table:table-cell>
          <table:table-cell office:value-type="string" calcext:value-type="string">
            <text:p>inf</text:p>
          </table:table-cell>
          <table:table-cell office:value-type="float" office:value="-23.7813077382945" calcext:value-type="float">
            <text:p>-23.7813077382945</text:p>
          </table:table-cell>
          <table:table-cell office:value-type="float" office:value="-49.6241119041152" calcext:value-type="float">
            <text:p>-49.6241119041152</text:p>
          </table:table-cell>
          <table:table-cell office:value-type="float" office:value="10.8727565837437" calcext:value-type="float">
            <text:p>10.8727565837437</text:p>
          </table:table-cell>
          <table:table-cell office:value-type="float" office:value="10.4677344149141" calcext:value-type="float">
            <text:p>10.4677344149141</text:p>
          </table:table-cell>
          <table:table-cell office:value-type="float" office:value="-27.6733940421651" calcext:value-type="float">
            <text:p>-27.6733940421651</text:p>
          </table:table-cell>
          <table:table-cell office:value-type="float" office:value="11.0238240672942" calcext:value-type="float">
            <text:p>11.0238240672942</text:p>
          </table:table-cell>
          <table:table-cell office:value-type="string" calcext:value-type="string">
            <text:p>inf</text:p>
          </table:table-cell>
          <table:table-cell office:value-type="float" office:value="-10.2698298653079" calcext:value-type="float">
            <text:p>-10.2698298653079</text:p>
          </table:table-cell>
          <table:table-cell table:number-columns-repeated="16343"/>
        </table:table-row>
        <table:table-row table:style-name="ro1">
          <table:table-cell/>
          <table:table-cell table:style-name="ce2" office:value-type="string" calcext:value-type="string">
            <text:p>#On note une certaine cohérence entre la spécificité de ces trois motifs. Il y en a plein d’autres qui sont apparentés (→ nécessité clustering à l’avenir)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#Mais est-ce qu’on ne retrouve pas juste le truc de JATD2022 (?) sur les syntagmes prépositionnels 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ruquer le truc</text:p>
          </table:table-cell>
          <table:table-cell office:value-type="string" calcext:value-type="string">
            <text:p>[{684}, {24}, {3}]</text:p>
          </table:table-cell>
          <table:table-cell office:value-type="string" calcext:value-type="string">
            <text:p>{pos_VERB} {pos_DET} {pos_NOUN}</text:p>
          </table:table-cell>
          <table:table-cell office:value-type="float" office:value="-190.1625707813" calcext:value-type="float">
            <text:p>-190.1625707813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-56.1398510550737" calcext:value-type="float">
            <text:p>-56.1398510550737</text:p>
          </table:table-cell>
          <table:table-cell office:value-type="float" office:value="-17.865210308026" calcext:value-type="float">
            <text:p>-17.865210308026</text:p>
          </table:table-cell>
          <table:table-cell office:value-type="float" office:value="-45.6069973247116" calcext:value-type="float">
            <text:p>-45.6069973247116</text:p>
          </table:table-cell>
          <table:table-cell office:value-type="string" calcext:value-type="string">
            <text:p>-inf</text:p>
          </table:table-cell>
          <table:table-cell office:value-type="float" office:value="-193.620354245992" calcext:value-type="float">
            <text:p>-193.620354245992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-64.8897527651084" calcext:value-type="float">
            <text:p>-64.8897527651084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-56.9437322010187" calcext:value-type="float">
            <text:p>-56.9437322010187</text:p>
          </table:table-cell>
          <table:table-cell office:value-type="string" calcext:value-type="string">
            <text:p>inf</text:p>
          </table:table-cell>
          <table:table-cell office:value-type="float" office:value="-145.323075594027" calcext:value-type="float">
            <text:p>-145.323075594027</text:p>
          </table:table-cell>
          <table:table-cell office:value-type="string" calcext:value-type="string">
            <text:p>inf</text:p>
          </table:table-cell>
          <table:table-cell office:value-type="float" office:value="-170.642813657551" calcext:value-type="float">
            <text:p>-170.642813657551</text:p>
          </table:table-cell>
          <table:table-cell office:value-type="float" office:value="-207.786551970712" calcext:value-type="float">
            <text:p>-207.786551970712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-12.5969900871265" calcext:value-type="float">
            <text:p>-12.5969900871265</text:p>
          </table:table-cell>
          <table:table-cell office:value-type="string" calcext:value-type="string">
            <text:p>inf</text:p>
          </table:table-cell>
          <table:table-cell office:value-type="float" office:value="-77.2364197570437" calcext:value-type="float">
            <text:p>-77.2364197570437</text:p>
          </table:table-cell>
          <table:table-cell table:number-columns-repeated="5" office:value-type="string" calcext:value-type="string">
            <text:p>inf</text:p>
          </table:table-cell>
          <table:table-cell office:value-type="float" office:value="-45.4469534828864" calcext:value-type="float">
            <text:p>-45.4469534828864</text:p>
          </table:table-cell>
          <table:table-cell table:number-columns-repeated="3" office:value-type="string" calcext:value-type="string">
            <text:p>inf</text:p>
          </table:table-cell>
          <table:table-cell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8:47:10.425597558</meta:creation-date>
    <dc:date>2025-03-04T10:33:30.221997667</dc:date>
    <meta:editing-duration>PT1H2M</meta:editing-duration>
    <meta:editing-cycles>1</meta:editing-cycles>
    <meta:document-statistic meta:table-count="1" meta:cell-count="253" meta:object-count="0"/>
    <meta:generator>LibreOffice/24.2.2.2$MacOSX_AARCH64 LibreOffice_project/d56cc158d8a96260b836f100ef4b4ef25d6f1a01</meta:generator>
  </office:meta>
</office:document-meta>
</file>